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3000000BBE5790FB2.png" manifest:media-type="image/png"/>
  <manifest:file-entry manifest:full-path="Pictures/100000010000064C000000E992889D0D.png" manifest:media-type="image/png"/>
  <manifest:file-entry manifest:full-path="Pictures/10000001000000BD0000008B1BC8C8BB.png" manifest:media-type="image/png"/>
  <manifest:file-entry manifest:full-path="Pictures/10000001000000FA00000054EC9EECAD.png" manifest:media-type="image/png"/>
  <manifest:file-entry manifest:full-path="Pictures/100000010000021F00000039E7C9DC7C.png" manifest:media-type="image/png"/>
  <manifest:file-entry manifest:full-path="Pictures/100000010000066E0000033C3AF5615A.png" manifest:media-type="image/png"/>
  <manifest:file-entry manifest:full-path="Pictures/10000001000000E6000000D4429D2B0E.png" manifest:media-type="image/png"/>
  <manifest:file-entry manifest:full-path="Pictures/100000010000073D0000034F4EA267DC.png" manifest:media-type="image/png"/>
  <manifest:file-entry manifest:full-path="Pictures/100000010000064B000001D3AC326C2A.png" manifest:media-type="image/png"/>
  <manifest:file-entry manifest:full-path="Pictures/100000010000036900000100BDC59DFE.png" manifest:media-type="image/png"/>
  <manifest:file-entry manifest:full-path="Pictures/10000001000002910000008099E93767.png" manifest:media-type="image/png"/>
  <manifest:file-entry manifest:full-path="Pictures/10000001000000FA00000261C1A7225E.png" manifest:media-type="image/png"/>
  <manifest:file-entry manifest:full-path="Pictures/10000001000003A100000033060FC12C.png" manifest:media-type="image/png"/>
  <manifest:file-entry manifest:full-path="Pictures/10000001000000DB00000058DC78C998.png" manifest:media-type="image/png"/>
  <manifest:file-entry manifest:full-path="Pictures/100000010000011D000001017A886772.png" manifest:media-type="image/png"/>
  <manifest:file-entry manifest:full-path="Pictures/100000010000010E0000005F8BE231AE.png" manifest:media-type="image/png"/>
  <manifest:file-entry manifest:full-path="Pictures/10000001000000FD00000081E615C73A.png" manifest:media-type="image/png"/>
  <manifest:file-entry manifest:full-path="Pictures/100000010000066F0000035E7AE36D6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Liberation Serif" svg:font-family="'LiLiberation Serif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5cdc9" officeooo:paragraph-rsid="0015cdc9"/>
    </style:style>
    <style:style style:name="P2" style:family="paragraph" style:parent-style-name="Text_20_body">
      <style:text-properties officeooo:rsid="0015cdc9" officeooo:paragraph-rsid="0015cdc9"/>
    </style:style>
    <style:style style:name="P3" style:family="paragraph" style:parent-style-name="Header">
      <style:paragraph-properties fo:text-align="center" style:justify-single-word="false"/>
      <style:text-properties officeooo:rsid="0015cdc9" officeooo:paragraph-rsid="004597ea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officeooo:rsid="0015cdc9" officeooo:paragraph-rsid="0015cdc9"/>
    </style:style>
    <style:style style:name="P9" style:family="paragraph" style:parent-style-name="Text_20_body">
      <style:text-properties officeooo:rsid="004aab0b" officeooo:paragraph-rsid="004c4e11"/>
    </style:style>
    <style:style style:name="P10" style:family="paragraph" style:parent-style-name="Text_20_body">
      <style:text-properties officeooo:rsid="0015cdc9" officeooo:paragraph-rsid="004c4e11"/>
    </style:style>
    <style:style style:name="P11" style:family="paragraph" style:parent-style-name="Heading_20_2">
      <style:text-properties officeooo:rsid="00183838" officeooo:paragraph-rsid="00183838"/>
    </style:style>
    <style:style style:name="P12" style:family="paragraph" style:parent-style-name="Text_20_body">
      <style:text-properties officeooo:rsid="00183838"/>
    </style:style>
    <style:style style:name="P13" style:family="paragraph" style:parent-style-name="Text_20_body">
      <style:text-properties officeooo:rsid="00183838" officeooo:paragraph-rsid="00183838"/>
    </style:style>
    <style:style style:name="P14" style:family="paragraph" style:parent-style-name="Heading_20_2">
      <style:paragraph-properties fo:break-before="page"/>
      <style:text-properties officeooo:paragraph-rsid="001b5b52"/>
    </style:style>
    <style:style style:name="P15" style:family="paragraph" style:parent-style-name="Heading_20_3">
      <style:paragraph-properties fo:margin-top="0cm" fo:margin-bottom="0.247cm" style:contextual-spacing="false" fo:line-height="115%"/>
      <style:text-properties style:font-name="LiLiberation Serif" officeooo:rsid="00203a76"/>
    </style:style>
    <style:style style:name="P16" style:family="paragraph" style:parent-style-name="Text_20_body">
      <style:text-properties style:font-name="LiLiberation Serif" officeooo:rsid="00203a76" officeooo:paragraph-rsid="0022d9a3"/>
    </style:style>
    <style:style style:name="P17" style:family="paragraph" style:parent-style-name="Text_20_body">
      <style:text-properties style:font-name="LiLiberation Serif" officeooo:rsid="00203a76"/>
    </style:style>
    <style:style style:name="P18" style:family="paragraph" style:parent-style-name="Text_20_body">
      <style:text-properties style:font-name="LiLiberation Serif" officeooo:rsid="00203a76" officeooo:paragraph-rsid="004fc1a6"/>
    </style:style>
    <style:style style:name="P19" style:family="paragraph" style:parent-style-name="Heading_20_3">
      <style:paragraph-properties fo:margin-top="0cm" fo:margin-bottom="0.247cm" style:contextual-spacing="false" fo:line-height="115%" fo:break-before="page"/>
      <style:text-properties style:font-name="LiLiberation Serif" officeooo:rsid="00203a76"/>
    </style:style>
    <style:style style:name="P20" style:family="paragraph" style:parent-style-name="Text_20_body">
      <style:text-properties style:font-name="LiLiberation Serif" officeooo:rsid="00244202" officeooo:paragraph-rsid="00244202"/>
    </style:style>
    <style:style style:name="P21" style:family="paragraph" style:parent-style-name="Heading_20_3">
      <style:paragraph-properties fo:margin-top="0cm" fo:margin-bottom="0.247cm" style:contextual-spacing="false" fo:line-height="115%" fo:keep-with-next="always"/>
    </style:style>
    <style:style style:name="P22" style:family="paragraph" style:parent-style-name="Text_20_body">
      <style:paragraph-properties fo:margin-top="0cm" fo:margin-bottom="0.247cm" style:contextual-spacing="false" fo:line-height="115%"/>
      <style:text-properties officeooo:rsid="0028ce38" officeooo:paragraph-rsid="0028ce38"/>
    </style:style>
    <style:style style:name="P23" style:family="paragraph" style:parent-style-name="Text_20_body">
      <style:paragraph-properties fo:margin-top="0cm" fo:margin-bottom="0.247cm" style:contextual-spacing="false" fo:line-height="115%"/>
      <style:text-properties officeooo:rsid="002a2b06" officeooo:paragraph-rsid="002a2b06"/>
    </style:style>
    <style:style style:name="P24" style:family="paragraph" style:parent-style-name="Heading_20_3">
      <style:paragraph-properties fo:margin-top="0cm" fo:margin-bottom="0.247cm" style:contextual-spacing="false" fo:line-height="115%" fo:keep-with-next="always"/>
      <style:text-properties style:font-name="LiLiberation Serif" officeooo:rsid="00203a76"/>
    </style:style>
    <style:style style:name="P25" style:family="paragraph" style:parent-style-name="Text_20_body">
      <style:paragraph-properties fo:margin-top="0cm" fo:margin-bottom="0.247cm" style:contextual-spacing="false" fo:line-height="115%"/>
      <style:text-properties style:font-name="LiLiberation Serif" officeooo:rsid="00203a76"/>
    </style:style>
    <style:style style:name="P26" style:family="paragraph" style:parent-style-name="Text_20_body">
      <style:paragraph-properties fo:margin-top="0cm" fo:margin-bottom="0.247cm" style:contextual-spacing="false" fo:line-height="115%"/>
      <style:text-properties style:font-name="LiLiberation Serif" officeooo:rsid="002fbd8e" officeooo:paragraph-rsid="00287182"/>
    </style:style>
    <style:style style:name="P27" style:family="paragraph" style:parent-style-name="Text_20_body">
      <style:paragraph-properties fo:text-align="start" style:justify-single-word="false"/>
      <style:text-properties style:font-name="LiLiberation Serif" officeooo:rsid="002b6008" officeooo:paragraph-rsid="002cea95"/>
    </style:style>
    <style:style style:name="P28" style:family="paragraph" style:parent-style-name="Text_20_body">
      <style:text-properties officeooo:rsid="00203a76" officeooo:paragraph-rsid="001b5b52"/>
    </style:style>
    <style:style style:name="P29" style:family="paragraph" style:parent-style-name="Heading_20_1">
      <style:text-properties officeooo:rsid="0030fb58" officeooo:paragraph-rsid="0030fb58"/>
    </style:style>
    <style:style style:name="P30" style:family="paragraph" style:parent-style-name="Text_20_body">
      <style:text-properties officeooo:paragraph-rsid="0030fb58"/>
    </style:style>
    <style:style style:name="P31" style:family="paragraph" style:parent-style-name="Text_20_body">
      <style:text-properties officeooo:paragraph-rsid="00330292"/>
    </style:style>
    <style:style style:name="P32" style:family="paragraph" style:parent-style-name="Text_20_body">
      <style:text-properties officeooo:rsid="00330292" officeooo:paragraph-rsid="00330292"/>
    </style:style>
    <style:style style:name="P33" style:family="paragraph" style:parent-style-name="Text_20_body">
      <style:text-properties officeooo:rsid="0033dca7" officeooo:paragraph-rsid="0033dca7"/>
    </style:style>
    <style:style style:name="P34" style:family="paragraph" style:parent-style-name="Text_20_body">
      <style:text-properties officeooo:rsid="003600a5" officeooo:paragraph-rsid="003600a5"/>
    </style:style>
    <style:style style:name="P35" style:family="paragraph" style:parent-style-name="Text_20_body">
      <style:text-properties officeooo:paragraph-rsid="003600a5"/>
    </style:style>
    <style:style style:name="P36" style:family="paragraph" style:parent-style-name="Text_20_body">
      <style:text-properties officeooo:rsid="00368832" officeooo:paragraph-rsid="00368832"/>
    </style:style>
    <style:style style:name="P37" style:family="paragraph" style:parent-style-name="Text_20_body">
      <style:text-properties officeooo:paragraph-rsid="00372f21"/>
    </style:style>
    <style:style style:name="P38" style:family="paragraph" style:parent-style-name="Text_20_body">
      <style:text-properties officeooo:rsid="00372f21" officeooo:paragraph-rsid="00372f21"/>
    </style:style>
    <style:style style:name="P39" style:family="paragraph" style:parent-style-name="Text_20_body">
      <style:text-properties officeooo:rsid="003ac80b" officeooo:paragraph-rsid="003ac80b"/>
    </style:style>
    <style:style style:name="P40" style:family="paragraph" style:parent-style-name="Text_20_body">
      <style:text-properties officeooo:rsid="003e5925" officeooo:paragraph-rsid="003e5925"/>
    </style:style>
    <style:style style:name="P41" style:family="paragraph" style:parent-style-name="Heading_20_1">
      <style:paragraph-properties fo:keep-with-next="always"/>
      <style:text-properties officeooo:rsid="0030fb58" officeooo:paragraph-rsid="0030fb58"/>
    </style:style>
    <style:style style:name="P42" style:family="paragraph" style:parent-style-name="Text_20_body">
      <style:text-properties style:font-name="Liberation Sans" officeooo:rsid="0030fb58" officeooo:paragraph-rsid="0030fb58" style:font-name-asian="Microsoft YaHei" style:font-name-complex="Arial1"/>
    </style:style>
    <style:style style:name="P43" style:family="paragraph" style:parent-style-name="Text_20_body">
      <style:text-properties style:font-name="Liberation Sans" officeooo:rsid="00434246" officeooo:paragraph-rsid="00434246" style:font-name-asian="Microsoft YaHei" style:font-name-complex="Arial1"/>
    </style:style>
    <style:style style:name="P44" style:family="paragraph" style:parent-style-name="Text_20_body">
      <style:text-properties style:font-name="Liberation Sans" officeooo:rsid="006048ea" officeooo:paragraph-rsid="006048ea" style:font-name-asian="Microsoft YaHei" style:font-name-complex="Arial1"/>
    </style:style>
    <style:style style:name="P45" style:family="paragraph" style:parent-style-name="Text_20_body">
      <style:text-properties style:font-name="Liberation Sans" officeooo:rsid="005c2869" officeooo:paragraph-rsid="005c2869" style:font-name-asian="Microsoft YaHei" style:font-name-complex="Arial1"/>
    </style:style>
    <style:style style:name="T1" style:family="text">
      <style:text-properties officeooo:rsid="00461753"/>
    </style:style>
    <style:style style:name="T2" style:family="text">
      <style:text-properties officeooo:rsid="004d275b"/>
    </style:style>
    <style:style style:name="T3" style:family="text">
      <style:text-properties officeooo:rsid="004c4e11"/>
    </style:style>
    <style:style style:name="T4" style:family="text">
      <style:text-properties style:font-name="LiLiberation Serif" officeooo:rsid="00203a76"/>
    </style:style>
    <style:style style:name="T5" style:family="text">
      <style:text-properties officeooo:rsid="0022d9a3"/>
    </style:style>
    <style:style style:name="T6" style:family="text">
      <style:text-properties officeooo:rsid="004f023a"/>
    </style:style>
    <style:style style:name="T7" style:family="text">
      <style:text-properties officeooo:rsid="004f9121"/>
    </style:style>
    <style:style style:name="T8" style:family="text">
      <style:text-properties officeooo:rsid="004fc1a6"/>
    </style:style>
    <style:style style:name="T9" style:family="text">
      <style:text-properties fo:font-variant="normal" fo:text-transform="none" fo:color="#770088" loext:opacity="100%" style:text-line-through-style="none" style:text-line-through-type="none" fo:font-family="monospace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0" style:family="text">
      <style:text-properties fo:font-variant="normal" fo:text-transform="none" fo:color="#444444" loext:opacity="100%" fo:letter-spacing="normal"/>
    </style:style>
    <style:style style:name="T11" style:family="text">
      <style:text-properties fo:font-variant="normal" fo:text-transform="none" fo:color="#444444" loext:opacity="100%" fo:font-family="monospace" fo:font-size="9.75pt" fo:letter-spacing="normal" fo:font-style="normal" fo:font-weight="normal"/>
    </style:style>
    <style:style style:name="T12" style:family="text">
      <style:text-properties fo:font-variant="normal" fo:text-transform="none" fo:color="#ff00ff" loext:opacity="100%" fo:font-family="monospace" fo:font-size="9.75pt" fo:letter-spacing="normal" fo:font-style="normal" fo:font-weight="normal"/>
    </style:style>
    <style:style style:name="T13" style:family="text">
      <style:text-properties fo:font-variant="normal" fo:text-transform="none" fo:color="#aa1111" loext:opacity="100%" fo:font-family="monospace" fo:font-size="9.75pt" fo:letter-spacing="normal" fo:font-style="normal" fo:font-weight="normal"/>
    </style:style>
    <style:style style:name="T14" style:family="text">
      <style:text-properties officeooo:rsid="00287182"/>
    </style:style>
    <style:style style:name="T15" style:family="text">
      <style:text-properties style:font-name="LiLiberation Serif"/>
    </style:style>
    <style:style style:name="T16" style:family="text">
      <style:text-properties officeooo:rsid="00330292"/>
    </style:style>
    <style:style style:name="T17" style:family="text">
      <style:text-properties officeooo:rsid="0033c55c"/>
    </style:style>
    <style:style style:name="T18" style:family="text">
      <style:text-properties style:font-name="Liberation Serif"/>
    </style:style>
    <style:style style:name="T19" style:family="text">
      <style:text-properties fo:font-variant="normal" fo:text-transform="none" fo:color="#999977" loext:opacity="100%" fo:font-family="monospace" fo:font-size="9.75pt" fo:letter-spacing="normal" fo:font-style="normal" fo:font-weight="normal"/>
    </style:style>
    <style:style style:name="T20" style:family="text">
      <style:text-properties fo:font-variant="normal" fo:text-transform="none" fo:color="#008855" loext:opacity="100%" fo:font-family="monospace" fo:font-size="9.75pt" fo:letter-spacing="normal" fo:font-style="normal" fo:font-weight="normal"/>
    </style:style>
    <style:style style:name="T21" style:family="text">
      <style:text-properties fo:font-variant="normal" fo:text-transform="none" fo:color="#221199" loext:opacity="100%" fo:font-family="monospace" fo:font-size="9.75pt" fo:letter-spacing="normal" fo:font-style="normal" fo:font-weight="normal"/>
    </style:style>
    <style:style style:name="T22" style:family="text">
      <style:text-properties fo:font-variant="normal" fo:text-transform="none" fo:color="#116644" loext:opacity="100%" fo:font-family="monospace" fo:font-size="9.75pt" fo:letter-spacing="normal" fo:font-style="normal" fo:font-weight="normal"/>
    </style:style>
    <style:style style:name="T23" style:family="text">
      <style:text-properties fo:font-variant="normal" fo:text-transform="none" fo:color="#770088" loext:opacity="100%" fo:font-family="monospace" fo:font-size="9.75pt" fo:letter-spacing="normal" fo:font-style="normal" fo:font-weight="normal"/>
    </style:style>
    <style:style style:name="T24" style:family="text">
      <style:text-properties officeooo:rsid="003600a5"/>
    </style:style>
    <style:style style:name="T25" style:family="text">
      <style:text-properties style:font-name="Liberation Serif" officeooo:rsid="003600a5"/>
    </style:style>
    <style:style style:name="T26" style:family="text">
      <style:text-properties officeooo:rsid="00372f21"/>
    </style:style>
    <style:style style:name="T27" style:family="text">
      <style:text-properties officeooo:rsid="003a170c"/>
    </style:style>
    <style:style style:name="T28" style:family="text">
      <style:text-properties officeooo:rsid="003c14f2"/>
    </style:style>
    <style:style style:name="T29" style:family="text">
      <style:text-properties style:font-name="Liberation Sans" style:font-name-asian="Microsoft YaHei" style:font-name-complex="Arial1"/>
    </style:style>
    <style:style style:name="T30" style:family="text">
      <style:text-properties officeooo:rsid="00435335"/>
    </style:style>
    <style:style style:name="T31" style:family="text">
      <style:text-properties officeooo:rsid="00607978"/>
    </style:style>
    <style:style style:name="T32" style:family="text">
      <style:text-properties officeooo:rsid="006236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ation technique de l’analyse et l’évolution de la b</text:span>ase de données Millenuit</text:p>
      <text:p text:style-name="P2"><draw:frame draw:style-name="fr1" draw:name="Image12" text:anchor-type="char" svg:x="-0.439cm" svg:y="2.399cm" svg:width="17.826cm" svg:height="13.109cm" draw:z-index="9"><draw:image xlink:href="Pictures/10000001000000BD0000008B1BC8C8BB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3">Alexis, Charles, Hug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4">Sommaire</text:p>
          </text:index-title>
          <text:p text:style-name="P5"><text:a xlink:type="simple" xlink:href="#__RefHeading___Toc60_3314469382" text:style-name="Index_20_Link" text:visited-style-name="Index_20_Link">Prérequis :<text:tab/>3</text:a></text:p>
          <text:p text:style-name="P6"><text:a xlink:type="simple" xlink:href="#__RefHeading___Toc1193_4207144653" text:style-name="Index_20_Link" text:visited-style-name="Index_20_Link">Création de la Base de données et importation des éléments :<text:tab/>3</text:a></text:p>
          <text:p text:style-name="P6"><text:a xlink:type="simple" xlink:href="#__RefHeading___Toc1195_4207144653" text:style-name="Index_20_Link" text:visited-style-name="Index_20_Link">Correction des Anomalies de la base de données :<text:tab/>4</text:a></text:p>
          <text:p text:style-name="P7"><text:a xlink:type="simple" xlink:href="#__RefHeading___Toc1197_4207144653" text:style-name="Index_20_Link" text:visited-style-name="Index_20_Link">Type Produit :<text:tab/>4</text:a></text:p>
          <text:p text:style-name="P7"><text:a xlink:type="simple" xlink:href="#__RefHeading___Toc1199_4207144653" text:style-name="Index_20_Link" text:visited-style-name="Index_20_Link">Dimension :<text:tab/>4</text:a></text:p>
          <text:p text:style-name="P7"><text:a xlink:type="simple" xlink:href="#__RefHeading___Toc1201_4207144653" text:style-name="Index_20_Link" text:visited-style-name="Index_20_Link">Prix produit :<text:tab/>5</text:a></text:p>
          <text:p text:style-name="P7"><text:a xlink:type="simple" xlink:href="#__RefHeading___Toc1203_4207144653" text:style-name="Index_20_Link" text:visited-style-name="Index_20_Link">Mail Commercial :<text:tab/>5</text:a></text:p>
          <text:p text:style-name="P7"><text:a xlink:type="simple" xlink:href="#__RefHeading___Toc1205_4207144653" text:style-name="Index_20_Link" text:visited-style-name="Index_20_Link">Téléphone commercial :<text:tab/>5</text:a></text:p>
          <text:p text:style-name="P7"><text:a xlink:type="simple" xlink:href="#__RefHeading___Toc1207_4207144653" text:style-name="Index_20_Link" text:visited-style-name="Index_20_Link">Téléphone Contact :<text:tab/>6</text:a></text:p>
          <text:p text:style-name="P7"><text:a xlink:type="simple" xlink:href="#__RefHeading___Toc1209_4207144653" text:style-name="Index_20_Link" text:visited-style-name="Index_20_Link">Id_Distributeur :<text:tab/>7</text:a></text:p>
          <text:p text:style-name="P5"><text:a xlink:type="simple" xlink:href="#__RefHeading___Toc60_3314469382%20Copie%201" text:style-name="Index_20_Link" text:visited-style-name="Index_20_Link">Evolution de la base de données :<text:tab/>7</text:a></text:p>
          <text:p text:style-name="P5"><text:a xlink:type="simple" xlink:href="#__RefHeading___Toc1742_4207144653" text:style-name="Index_20_Link" text:visited-style-name="Index_20_Link">Gestion à l’accès de l’application :<text:tab/>10</text:a></text:p>
        </text:index-body>
      </text:table-of-content>
      <text:p text:style-name="P2"/>
      <text:h text:style-name="P8" text:outline-level="1"><text:bookmark-start text:name="__RefHeading___Toc60_3314469382"/><text:span text:style-name="T2">Intoduction</text:span> : <text:bookmark-end text:name="__RefHeading___Toc60_3314469382"/></text:h>
      <text:p text:style-name="P9">L’entreprise Millenuits nous a demander d’analyser et de faire l’évolution de leur base de données car elle n’était pas conforme à leurs besoins. De plus, il fallait corriger les anomalies et mettre à jour le jeu d’essai. Ainsi que compléter la base de données afin de prendre en compte les évolutions et alimenter les nouvelles tables avec un jeu d’essai.</text:p>
      <text:p text:style-name="P10"/>
      <text:p text:style-name="P10"><text:span text:style-name="T3">Base de données de Millenuits au départ :</text:span><text:line-break/><text:line-break/><text:line-break/><draw:frame draw:style-name="fr1" draw:name="Image1" text:anchor-type="char" svg:x="0cm" svg:y="2.334cm" svg:width="17cm" svg:height="8.551cm" draw:z-index="15"><draw:image xlink:href="Pictures/100000010000066E0000033C3AF5615A.png" xlink:type="simple" xlink:show="embed" xlink:actuate="onLoad" draw:mime-type="image/png"/></draw:frame><text:line-break/><text:line-break/><text:line-break/><text:line-break/><text:line-break/></text:p>
      <text:h text:style-name="P11" text:outline-level="2"><text:bookmark-start text:name="__RefHeading___Toc1193_4207144653"/>Création de la Base de données et importation des éléments :<text:bookmark-end text:name="__RefHeading___Toc1193_4207144653"/></text:h>
      <text:p text:style-name="P12">Dans un premier temps nous avons créer la base de données « MilleNuit » puis nous avons importé les tables et les données dans la base de données.</text:p>
      <text:p text:style-name="P13"><text:soft-page-break/><text:line-break/><draw:frame draw:style-name="fr1" draw:name="Image2" text:anchor-type="char" svg:x="0cm" svg:y="1.228cm" svg:width="17cm" svg:height="7.77cm" draw:z-index="0"><draw:image xlink:href="Pictures/100000010000073D0000034F4EA267DC.png" xlink:type="simple" xlink:show="embed" xlink:actuate="onLoad" draw:mime-type="image/png"/></draw:frame><text:line-break/></text:p>
      <text:h text:style-name="P14" text:outline-level="2"><text:bookmark-start text:name="__RefHeading___Toc1195_4207144653"/><text:span text:style-name="Source_20_Text"><text:span text:style-name="T4">Correction des Anomalies de la base de données :</text:span></text:span><text:bookmark-end text:name="__RefHeading___Toc1195_4207144653"/></text:h>
      <text:h text:style-name="P15" text:outline-level="3"><text:bookmark-start text:name="__RefHeading___Toc1197_4207144653"/>Type Produit :<text:bookmark-end text:name="__RefHeading___Toc1197_4207144653"/></text:h>
      <text:p text:style-name="P16">Afin de mettre le type de garnissage en liste déroulante dans la table produit, il nous à fallu</text:p>
      <text:p text:style-name="P16"><draw:frame draw:style-name="fr1" draw:name="Image3" text:anchor-type="char" svg:x="-0.056cm" svg:y="0.681cm" svg:width="6.615cm" svg:height="2.223cm" draw:z-index="1"><draw:image xlink:href="Pictures/10000001000000FA00000054EC9EECAD.png" xlink:type="simple" xlink:show="embed" xlink:actuate="onLoad" draw:mime-type="image/png"/></draw:frame>créer une nouvelle table <text:span text:style-name="T5">nommer type_garnissage</text:span> avec id_garnissage et libelle_garnissage</text:p>
      <text:p text:style-name="P16"/>
      <text:p text:style-name="P16"/>
      <text:p text:style-name="P16"/>
      <text:p text:style-name="P16"><text:span text:style-name="T6">Nous avons </text:span>créer une ligne dans produit nommer id_garnissage fessant référence à id_garnissage de type_garnissage.</text:p>
      <text:p text:style-name="P16"><draw:frame draw:style-name="fr1" draw:name="Image4" text:anchor-type="char" svg:x="0.012cm" svg:y="-0.168cm" svg:width="4.868cm" svg:height="4.487cm" draw:z-index="2"><draw:image xlink:href="Pictures/10000001000000E6000000D4429D2B0E.png" xlink:type="simple" xlink:show="embed" xlink:actuate="onLoad" draw:mime-type="image/png"/></draw:frame></text:p>
      <text:p text:style-name="P16"/>
      <text:p text:style-name="P17"/>
      <text:h text:style-name="P15" text:outline-level="3"/>
      <text:h text:style-name="P15" text:outline-level="3"/>
      <text:h text:style-name="P15" text:outline-level="3"><text:bookmark-start text:name="__RefHeading___Toc1199_4207144653"/>Dimension :<text:bookmark-end text:name="__RefHeading___Toc1199_4207144653"/></text:h>
      <text:p text:style-name="P18"><text:span text:style-name="T7">Dans le but que plusieurs produits puissent avoir plusieurs dimensions</text:span>, nous avons créer une table nommer dimension qui à pour but de rentrer un id de produit <text:span text:style-name="T5">et un id de taille pour qu’un produit puisse avoir plusieurs taille.</text:span></text:p>
      <text:p text:style-name="P16"><draw:frame draw:style-name="fr2" draw:name="Image5" text:anchor-type="char" svg:width="17cm" svg:height="4.983cm" draw:z-index="8"><draw:image xlink:href="Pictures/100000010000036900000100BDC59DFE.png" xlink:type="simple" xlink:show="embed" xlink:actuate="onLoad" draw:mime-type="image/png"/></draw:frame></text:p>
      <text:p text:style-name="P17"/>
      <text:h text:style-name="P15" text:outline-level="3"/>
      <text:h text:style-name="P15" text:outline-level="3"/>
      <text:h text:style-name="P19" text:outline-level="3"><text:bookmark-start text:name="__RefHeading___Toc1201_4207144653"/>Prix produit :<text:bookmark-end text:name="__RefHeading___Toc1201_4207144653"/></text:h>
      <text:p text:style-name="P17">pour permettre de mettre le prix des produits à 4 chiffres (1198) il faut modifier la taille permise dans la ligne prix et la changer de 5,2 à 6,2. <text:span text:style-name="T8">Cela signifie qu’il pourra y avoir jusu’à 6 chiffre devant la virgule et 2 derrière la virgule.</text:span><text:line-break/><draw:frame draw:style-name="fr1" draw:name="Image6" text:anchor-type="char" svg:x="0cm" svg:y="1.725cm" svg:width="17cm" svg:height="4.927cm" draw:z-index="3"><draw:image xlink:href="Pictures/100000010000064B000001D3AC326C2A.png" xlink:type="simple" xlink:show="embed" xlink:actuate="onLoad" draw:mime-type="image/png"/></draw:frame></text:p>
      <text:p text:style-name="P20"><draw:frame draw:style-name="fr1" draw:name="Image7" text:anchor-type="char" svg:x="0cm" svg:y="-0.058cm" svg:width="17cm" svg:height="2.457cm" draw:z-index="4"><draw:image xlink:href="Pictures/100000010000064C000000E992889D0D.png" xlink:type="simple" xlink:show="embed" xlink:actuate="onLoad" draw:mime-type="image/png"/></draw:frame>Le passage d'une précision de 5 à 6 chiffres permet d'augmenter la valeur maximale autorisée. Alors qu'une limite à 5 chiffres restreignait les montants à 999,99, une précision de 6 permet désormais d'atteindre 9 999,99, couvrant ainsi les prix dépassant le millier d'euros. </text:p>
      <text:h text:style-name="P15" text:outline-level="3"/>
      <text:h text:style-name="P15" text:outline-level="3"><text:bookmark-start text:name="__RefHeading___Toc1203_4207144653"/>Mail Commercial :<text:bookmark-end text:name="__RefHeading___Toc1203_4207144653"/></text:h>
      <text:p text:style-name="P17">Afin d'automatiser la génération des adresses e-mail à partir du prénom et du nom des contacts, nous avons utilisé la commande <text:span text:style-name="Source_20_Text">UPDATE</text:span>. Celle-ci modifie la table existante en concaténant les informations d'identité avec le nom de domaine de l'entreprise. <text:line-break/>« UPDATE commercial</text:p>
      <text:p text:style-name="P18">SET mail = LOWER <text:span text:style-name="T8">(</text:span>CONCAT(prenom,'.', nom, '<text:span text:style-name="T5">@</text:span>millenuits.com')<text:span text:style-name="T8">)</text:span> »</text:p>
      <text:p text:style-name="P17"/>
      <text:h text:style-name="P21" text:outline-level="3"><text:bookmark-start text:name="__RefHeading___Toc1205_4207144653"/>Téléphone commercial :<text:bookmark-end text:name="__RefHeading___Toc1205_4207144653"/></text:h>
      <text:p text:style-name="P22">Modifier le numéro de téléphone portable de chaque commercial avec la requête suivante :</text:p>
      <text:p text:style-name="P22"><text:a xlink:type="simple" xlink:href="http://localhost/phpmyadmin/url.php?url=https://dev.mysql.com/doc/refman/8.0/en/update.html" office:target-frame-name="mysql_doc" xlink:show="replace" text:style-name="Internet_20_link" text:visited-style-name="Visited_20_Internet_20_Link"><text:span text:style-name="T9">UPDATE</text:span></text:a><text:span text:style-name="T10"> </text:span><text:span text:style-name="T11">commercial</text:span><text:span text:style-name="T10"> </text:span><text:a xlink:type="simple" xlink:href="http://localhost/phpmyadmin/url.php?url=https://dev.mysql.com/doc/refman/8.0/en/set.html" office:target-frame-name="mysql_doc" xlink:show="replace" text:style-name="Internet_20_link" text:visited-style-name="Visited_20_Internet_20_Link"><text:span text:style-name="T9">SET</text:span></text:a><text:span text:style-name="T10"> </text:span><text:span text:style-name="T11">tel_portable</text:span><text:span text:style-name="T10"> </text:span><text:span text:style-name="T12">=</text:span><text:span text:style-name="T10"> </text:span><text:span text:style-name="T13">'0647253895'</text:span><text:span text:style-name="T11">;</text:span></text:p>
      <text:p text:style-name="P23"/>
      <text:p text:style-name="P23"/>
      <text:p text:style-name="P23"><text:soft-page-break/>Donc dans la table commercial : </text:p>
      <text:p text:style-name="P17"><draw:frame draw:style-name="fr1" draw:name="Image10" text:anchor-type="char" svg:x="0.183cm" svg:y="-0.108cm" svg:width="17cm" svg:height="3.311cm" draw:z-index="16"><draw:image xlink:href="Pictures/10000001000002910000008099E9376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4" text:outline-level="3"><text:bookmark-start text:name="__RefHeading___Toc1207_4207144653"/>Téléphone <text:span text:style-name="T14">C</text:span>ontact :<text:bookmark-end text:name="__RefHeading___Toc1207_4207144653"/></text:h>
      <text:p text:style-name="P25">Afin de garantir l'intégrité des données, les numéros de téléphone non renseignés (précédemment saisis sous la forme "9999999999") ont été convertis en valeur <text:span text:style-name="Source_20_Text">NULL</text:span>. Pour ce faire, une requête <text:span text:style-name="Source_20_Text">UPDATE</text:span> a été exécutée, et la structure de la table a été modifiée pour définir <text:span text:style-name="Source_20_Text">NULL</text:span> comme valeur par défaut pour ce champ. </text:p>
      <text:p text:style-name="P26">UPDATE commercial SET tel_portable = NULL WHERE <draw:frame draw:style-name="fr1" draw:name="Image9" text:anchor-type="char" svg:x="11.053cm" svg:y="0.004cm" svg:width="3.549cm" svg:height="8.647cm" draw:z-index="6"><draw:image xlink:href="Pictures/10000001000000FA00000261C1A7225E.png" xlink:type="simple" xlink:show="embed" xlink:actuate="onLoad" draw:mime-type="image/png"/></draw:frame>tel_portable = '9999999999'; </text:p>
      <text:h text:style-name="P19" text:outline-level="3"><text:bookmark-start text:name="__RefHeading___Toc1209_4207144653"/>Id_Distributeur :<text:bookmark-end text:name="__RefHeading___Toc1209_4207144653"/></text:h>
      <text:p text:style-name="Text_20_body"><text:span text:style-name="T4">L'erreur liée à l'identifiant </text:span><text:span text:style-name="Source_20_Text"><text:span text:style-name="T4">id_commercial</text:span></text:span><text:span text:style-name="T4"> provenait de l'absence de relation (clé étrangère) entre les tables </text:span><text:span text:style-name="Source_20_Text"><text:span text:style-name="T4">commercial</text:span></text:span><text:span text:style-name="T4"> et </text:span><text:span text:style-name="Source_20_Text"><text:span text:style-name="T4">distributeur</text:span></text:span><text:span text:style-name="T4">.</text:span></text:p>
      <text:p text:style-name="Text_20_body"><text:span text:style-name="T4">Afin de remédier à ce problème, nous avons d'abord corrigé la valeur erronée dans la table </text:span><text:span text:style-name="Source_20_Text"><text:span text:style-name="T4">distributeur</text:span></text:span><text:span text:style-name="T4"> à l'aide de la commande suivante : </text:span></text:p>
      <text:p text:style-name="P17"/>
      <text:p text:style-name="P17">UPDATE <text:span text:style-name="Source_20_Text"><text:span text:style-name="T15">distributeur</text:span></text:span> SET <text:span text:style-name="Source_20_Text"><text:span text:style-name="T15">id_commercial</text:span></text:span> = '1' WHERE <text:span text:style-name="Source_20_Text"><text:span text:style-name="T15">distributeur</text:span></text:span>.<text:span text:style-name="Source_20_Text"><text:span text:style-name="T15">id</text:span></text:span> = 1;</text:p>
      <text:p text:style-name="P27">Résultat : </text:p>
      <text:p text:style-name="P27"><draw:frame draw:style-name="fr3" draw:name="Image11" text:anchor-type="char" svg:width="17cm" svg:height="0.933cm" draw:z-index="7"><draw:image xlink:href="Pictures/10000001000003A100000033060FC12C.png" xlink:type="simple" xlink:show="embed" xlink:actuate="onLoad" draw:mime-type="image/png"/></draw:frame></text:p>
      <text:p text:style-name="P17">Puis nous avons ajouter la contrainte de clé étrangère entre distributeur et commercial</text:p>
      <text:p text:style-name="P28"><draw:frame draw:style-name="fr1" draw:name="Image8" text:anchor-type="char" svg:x="0.035cm" svg:y="0.023cm" svg:width="12.781cm" svg:height="4.948cm" draw:z-index="5"><draw:image xlink:href="Pictures/10000001000001E3000000BBE5790FB2.png" xlink:type="simple" xlink:show="embed" xlink:actuate="onLoad" draw:mime-type="image/png"/></draw:frame><text:span text:style-name="T15"/></text:p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><text:bookmark-start text:name="__RefHeading___Toc60_3314469382 Copie 1"/>Evolution de la base de données :<text:bookmark-end text:name="__RefHeading___Toc60_3314469382 Copie 1"/></text:h>
      <text:p text:style-name="P30">L'évolution de la base de données avait pour objectif d'enrichir le suivi commercial et de structurer la gestion des visites auprès des distributeurs. </text:p>
      <text:p text:style-name="P31"><text:span text:style-name="T16">La table M</text:span><text:span text:style-name="T17">otif</text:span><text:span text:style-name="T16"> : </text:span>Création de la table <text:span text:style-name="Source_20_Text"><text:span text:style-name="T18">motif</text:span></text:span> : pour catégoriser les raisons des rendez-vous </text:p>
      <text:p text:style-name="P32"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CREATE</text:span></text:a><text:span text:style-name="T10"> </text:span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motif</text:span><text:span text:style-name="T19">(</text:span><text:span text:style-name="T10"> </text:span><text:span text:style-name="T11">id_motif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libelle_motif</text:span><text:span text:style-name="T10"> </text:span><text:span text:style-name="T20">varchar</text:span><text:span text:style-name="T19">(</text:span><text:span text:style-name="T22">50</text:span><text:span text:style-name="T19">)</text:span><text:span text:style-name="T11">,</text:span><text:span text:style-name="T10"> </text:span><text:span text:style-name="T23">CONSTRAINT</text:span><text:span text:style-name="T10"> </text:span><text:span text:style-name="T11">pk_motif</text:span><text:span text:style-name="T10"> </text:span><text:span text:style-name="T23">PRIMARY</text:span><text:span text:style-name="T10"> </text:span><text:span text:style-name="T23">KEY</text:span><text:span text:style-name="T10"> </text:span><text:span text:style-name="T19">(</text:span><text:span text:style-name="T11">id_motif</text:span><text:span text:style-name="T19">)</text:span><text:span text:style-name="T10"> </text:span><text:span text:style-name="T19">)</text:span><text:span text:style-name="T11">;</text:span> </text:p>
      <text:p text:style-name="P32"><draw:frame draw:style-name="fr1" draw:name="Image13" text:anchor-type="char" svg:x="0.656cm" svg:y="0.25cm" svg:width="5.794cm" svg:height="2.328cm" draw:z-index="10"><draw:image xlink:href="Pictures/10000001000000DB00000058DC78C998.png" xlink:type="simple" xlink:show="embed" xlink:actuate="onLoad" draw:mime-type="image/png"/></draw:frame><text:tab/></text:p>
      <text:p text:style-name="P32"/>
      <text:p text:style-name="P32"/>
      <text:p text:style-name="P32"><text:soft-page-break/></text:p>
      <text:p text:style-name="P33"/>
      <text:p text:style-name="P33"/>
      <text:p text:style-name="P33"/>
      <text:p text:style-name="P33">La table visite :</text:p>
      <text:p text:style-name="P31">Création de la table <text:span text:style-name="Source_20_Text"><text:span text:style-name="T18">visite</text:span></text:span> : pour centraliser les données clés </text:p>
      <text:p text:style-name="P33"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CREATE</text:span></text:a><text:span text:style-name="T10"> </text:span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visite</text:span><text:span text:style-name="T19">(</text:span><text:span text:style-name="T10"> </text:span><text:span text:style-name="T11">id_visite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date_visite</text:span><text:span text:style-name="T10"> </text:span><text:span text:style-name="T20">date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bilan_visite</text:span><text:span text:style-name="T10"> </text:span><text:span text:style-name="T20">tex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personne_rencontree</text:span><text:span text:style-name="T10"> </text:span><text:span text:style-name="T20">varchar</text:span><text:span text:style-name="T19">(</text:span><text:span text:style-name="T22">50</text:span><text:span text:style-name="T19">)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coefConfiance</text:span><text:span text:style-name="T10"> </text:span><text:span text:style-name="T20">varchar</text:span><text:span text:style-name="T19">(</text:span><text:span text:style-name="T22">36</text:span><text:span text:style-name="T19">)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id_motif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id_commercial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id_distributeur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id_contact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23">CONSTRAINT</text:span><text:span text:style-name="T10"> </text:span><text:span text:style-name="T11">pk_visite</text:span><text:span text:style-name="T10"> </text:span><text:span text:style-name="T23">PRIMARY</text:span><text:span text:style-name="T10"> </text:span><text:span text:style-name="T23">KEY</text:span><text:span text:style-name="T10"> </text:span><text:span text:style-name="T19">(</text:span><text:span text:style-name="T11">id_visite</text:span><text:span text:style-name="T19">)</text:span><text:span text:style-name="T10"> </text:span><text:span text:style-name="T19">)</text:span><text:span text:style-name="T11">;</text:span> </text:p>
      <text:p text:style-name="P33"><draw:frame draw:style-name="fr3" draw:name="Image14" text:anchor-type="char" svg:width="7.541cm" svg:height="6.8cm" draw:z-index="11"><draw:image xlink:href="Pictures/100000010000011D000001017A886772.png" xlink:type="simple" xlink:show="embed" xlink:actuate="onLoad" draw:mime-type="image/png"/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La table produit presenté :</text:p>
      <text:p text:style-name="P35"><text:span text:style-name="T24">Afin de savoir quels produits sont mis en avant lors des rendez-vous, nous avons créé une table de liaison </text:span><text:span text:style-name="Source_20_Text"><text:span text:style-name="T25">produit_presente</text:span></text:span><text:span text:style-name="T25">.</text:span><text:span text:style-name="T24"> Celle-ci permet d'associer un ou plusieurs produits à une visite spécifique, offrant ainsi un historique précis des présentations effectuées par les commerciaux. </text:span></text:p>
      <text:p text:style-name="P34"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CREATE</text:span></text:a><text:span text:style-name="T10"> </text:span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produit_presente</text:span><text:span text:style-name="T19">(</text:span><text:span text:style-name="T10"> </text:span><text:span text:style-name="T11">id_produit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id_visite</text:span><text:span text:style-name="T10"> </text:span><text:span text:style-name="T20">int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23">CONSTRAINT</text:span><text:span text:style-name="T10"> </text:span><text:span text:style-name="T11">pk_produit_presente</text:span><text:span text:style-name="T10"> </text:span><text:span text:style-name="T23">PRIMARY</text:span><text:span text:style-name="T10"> </text:span><text:span text:style-name="T23">KEY</text:span><text:span text:style-name="T10"> </text:span><text:span text:style-name="T19">(</text:span><text:span text:style-name="T11">id_produit,</text:span><text:span text:style-name="T10"> </text:span><text:span text:style-name="T11">id_visite</text:span><text:span text:style-name="T19">)</text:span><text:span text:style-name="T10"> </text:span><text:span text:style-name="T19">)</text:span><text:span text:style-name="T11">;</text:span> </text:p>
      <text:p text:style-name="P34"><draw:frame draw:style-name="fr1" draw:name="Image15" text:anchor-type="char" svg:x="-0.217cm" svg:y="0.145cm" svg:width="7.144cm" svg:height="2.514cm" draw:z-index="12"><draw:image xlink:href="Pictures/100000010000010E0000005F8BE231AE.png" xlink:type="simple" xlink:show="embed" xlink:actuate="onLoad" draw:mime-type="image/png"/></draw:frame></text:p>
      <text:p text:style-name="P34"><text:tab/></text:p>
      <text:p text:style-name="P34"/>
      <text:p text:style-name="P34"/>
      <text:p text:style-name="P34"/>
      <text:p text:style-name="P36"><text:soft-page-break/>Faire les liens entre les tables avec les clés :</text:p>
      <text:p text:style-name="P36">table visite : </text:p>
      <text:p text:style-name="P37"><text:span text:style-name="T26">-avec la table motif : 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visite</text:span><text:span text:style-name="T10"> </text:span><text:span text:style-name="T23">ADD</text:span><text:span text:style-name="T10"> </text:span><text:span text:style-name="T23">CONSTRAINT</text:span><text:span text:style-name="T10"> </text:span><text:span text:style-name="T11">fk_visite_motif</text:span><text:span text:style-name="T10"> </text:span><text:span text:style-name="T23">FOREIGN</text:span><text:span text:style-name="T10"> </text:span><text:span text:style-name="T23">KEY</text:span><text:span text:style-name="T10"> </text:span><text:span text:style-name="T19">(</text:span><text:span text:style-name="T11">id_motif</text:span><text:span text:style-name="T19">)</text:span><text:span text:style-name="T10"> </text:span><text:span text:style-name="T23">REFERENCES</text:span><text:span text:style-name="T10"> </text:span><text:span text:style-name="T11">motif</text:span><text:span text:style-name="T19">(</text:span><text:span text:style-name="T11">id_motif</text:span><text:span text:style-name="T19">)</text:span><text:span text:style-name="T11">;</text:span> </text:p>
      <text:p text:style-name="P38">-avec la table commerciale :</text:p>
      <text:p text:style-name="P38"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visite</text:span><text:span text:style-name="T10"> </text:span><text:span text:style-name="T23">ADD</text:span><text:span text:style-name="T10"> </text:span><text:span text:style-name="T23">CONSTRAINT</text:span><text:span text:style-name="T10"> </text:span><text:span text:style-name="T11">fk_visite_commercial</text:span><text:span text:style-name="T10"> </text:span><text:span text:style-name="T23">FOREIGN</text:span><text:span text:style-name="T10"> </text:span><text:span text:style-name="T23">KEY</text:span><text:span text:style-name="T10"> </text:span><text:span text:style-name="T19">(</text:span><text:span text:style-name="T11">id_commercial</text:span><text:span text:style-name="T19">)</text:span><text:span text:style-name="T10"> </text:span><text:span text:style-name="T23">REFERENCES</text:span><text:span text:style-name="T10"> </text:span><text:span text:style-name="T11">commercial</text:span><text:span text:style-name="T19">(</text:span><text:span text:style-name="T11">id</text:span><text:span text:style-name="T19">)</text:span><text:span text:style-name="T11">;</text:span> </text:p>
      <text:p text:style-name="P38">-avec la table distributeur :</text:p>
      <text:p text:style-name="P38"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visite</text:span><text:span text:style-name="T10"> </text:span><text:span text:style-name="T23">ADD</text:span><text:span text:style-name="T10"> </text:span><text:span text:style-name="T23">CONSTRAINT</text:span><text:span text:style-name="T10"> </text:span><text:span text:style-name="T11">fk_visite_distributeur</text:span><text:span text:style-name="T10"> </text:span><text:span text:style-name="T23">FOREIGN</text:span><text:span text:style-name="T10"> </text:span><text:span text:style-name="T23">KEY</text:span><text:span text:style-name="T10"> </text:span><text:span text:style-name="T19">(</text:span><text:span text:style-name="T11">id_distributeur</text:span><text:span text:style-name="T19">)</text:span><text:span text:style-name="T10"> </text:span><text:span text:style-name="T23">REFERENCES</text:span><text:span text:style-name="T10"> </text:span><text:span text:style-name="T11">distributeur</text:span><text:span text:style-name="T19">(</text:span><text:span text:style-name="T11">id</text:span><text:span text:style-name="T19">)</text:span><text:span text:style-name="T11">;</text:span> </text:p>
      <text:p text:style-name="P38">-<text:span text:style-name="T27">avec la table contact :</text:span></text:p>
      <text:p text:style-name="P38"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visite</text:span><text:span text:style-name="T10"> </text:span><text:span text:style-name="T23">ADD</text:span><text:span text:style-name="T10"> </text:span><text:span text:style-name="T23">CONSTRAINT</text:span><text:span text:style-name="T10"> </text:span><text:span text:style-name="T11">fk_visite_contact</text:span><text:span text:style-name="T10"> </text:span><text:span text:style-name="T23">FOREIGN</text:span><text:span text:style-name="T10"> </text:span><text:span text:style-name="T23">KEY</text:span><text:span text:style-name="T10"> </text:span><text:span text:style-name="T19">(</text:span><text:span text:style-name="T11">id_contact</text:span><text:span text:style-name="T19">)</text:span><text:span text:style-name="T10"> </text:span><text:span text:style-name="T23">REFERENCES</text:span><text:span text:style-name="T10"> </text:span><text:span text:style-name="T11">contact</text:span><text:span text:style-name="T19">(</text:span><text:span text:style-name="T11">id</text:span><text:span text:style-name="T19">)</text:span><text:span text:style-name="T11">;</text:span> </text:p>
      <text:p text:style-name="P38"/>
      <text:p text:style-name="P39">table produit présenté :</text:p>
      <text:p text:style-name="P39">-avec la table produit :</text:p>
      <text:p text:style-name="P39"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produit_presente</text:span><text:span text:style-name="T10"> </text:span><text:span text:style-name="T23">ADD</text:span><text:span text:style-name="T10"> </text:span><text:span text:style-name="T23">CONSTRAINT</text:span><text:span text:style-name="T10"> </text:span><text:span text:style-name="T11">fk_produit_presente_produit</text:span><text:span text:style-name="T10"> </text:span><text:span text:style-name="T23">FOREIGN</text:span><text:span text:style-name="T10"> </text:span><text:span text:style-name="T23">KEY</text:span><text:span text:style-name="T10"> </text:span><text:span text:style-name="T19">(</text:span><text:span text:style-name="T11">id_produit</text:span><text:span text:style-name="T19">)</text:span><text:span text:style-name="T10"> </text:span><text:span text:style-name="T23">REFERENCES</text:span><text:span text:style-name="T10"> </text:span><text:span text:style-name="T11">produit</text:span><text:span text:style-name="T19">(</text:span><text:span text:style-name="T11">id</text:span><text:span text:style-name="T19">)</text:span><text:span text:style-name="T11">;</text:span> </text:p>
      <text:p text:style-name="P39">-<text:span text:style-name="T28">avec la table visite :</text:span></text:p>
      <text:p text:style-name="P39"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produit_presente</text:span><text:span text:style-name="T10"> </text:span><text:span text:style-name="T23">ADD</text:span><text:span text:style-name="T10"> </text:span><text:span text:style-name="T23">CONSTRAINT</text:span><text:span text:style-name="T10"> </text:span><text:span text:style-name="T11">fk_produit_presente_visite</text:span><text:span text:style-name="T10"> </text:span><text:span text:style-name="T23">FOREIGN</text:span><text:span text:style-name="T10"> </text:span><text:span text:style-name="T23">KEY</text:span><text:span text:style-name="T10"> </text:span><text:span text:style-name="T19">(</text:span><text:span text:style-name="T11">id_visite</text:span><text:span text:style-name="T19">)</text:span><text:span text:style-name="T10"> </text:span><text:span text:style-name="T23">REFERENCES</text:span><text:span text:style-name="T10"> </text:span><text:span text:style-name="T11">visite</text:span><text:span text:style-name="T19">(</text:span><text:span text:style-name="T11">id_visite</text:span><text:span text:style-name="T19">)</text:span><text:span text:style-name="T11">;</text:span> 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1" text:outline-level="1"><text:bookmark-start text:name="__RefHeading___Toc1742_4207144653"/><text:soft-page-break/><text:span text:style-name="T29">Gestion à l’accès de l’application :</text:span><text:bookmark-end text:name="__RefHeading___Toc1742_4207144653"/></text:h>
      <text:p text:style-name="P42"/>
      <text:p text:style-name="P43">Création d’une table utilisateur :</text:p>
      <text:p text:style-name="P43"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CREATE</text:span></text:a><text:span text:style-name="T10"> </text:span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9">TABLE</text:span></text:a><text:span text:style-name="T10"> </text:span><text:span text:style-name="T11">utilisateur</text:span><text:span text:style-name="T19">(</text:span><text:span text:style-name="T10"> </text:span><text:span text:style-name="T11">id</text:span><text:span text:style-name="T10"> </text:span><text:span text:style-name="T20">int</text:span><text:span text:style-name="T10"> </text:span><text:span text:style-name="T23">AUTO_INCREMENT</text:span><text:span text:style-name="T11">,</text:span><text:span text:style-name="T10"> </text:span><text:span text:style-name="T11">identifiant</text:span><text:span text:style-name="T10"> </text:span><text:span text:style-name="T20">varchar</text:span><text:span text:style-name="T19">(</text:span><text:span text:style-name="T22">50</text:span><text:span text:style-name="T19">)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11">mot_de_passe</text:span><text:span text:style-name="T10"> </text:span><text:span text:style-name="T20">char</text:span><text:span text:style-name="T19">(</text:span><text:span text:style-name="T22">128</text:span><text:span text:style-name="T19">)</text:span><text:span text:style-name="T10"> 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T9">NOT</text:span></text:a><text:span text:style-name="T10"> </text:span><text:span text:style-name="T21">NULL</text:span><text:span text:style-name="T11">,</text:span><text:span text:style-name="T10"> </text:span><text:span text:style-name="T23">CONSTRAINT</text:span><text:span text:style-name="T10"> </text:span><text:span text:style-name="T11">pk_utilisateur</text:span><text:span text:style-name="T10"> </text:span><text:span text:style-name="T23">PRIMARY</text:span><text:span text:style-name="T10"> </text:span><text:span text:style-name="T23">KEY</text:span><text:span text:style-name="T10"> </text:span><text:span text:style-name="T19">(</text:span><text:span text:style-name="T11">id</text:span><text:span text:style-name="T19">)</text:span><text:span text:style-name="T10"> </text:span><text:span text:style-name="T19">)</text:span><text:span text:style-name="T11">;</text:span> </text:p>
      <text:p text:style-name="P43"><draw:frame draw:style-name="fr1" draw:name="Image17" text:anchor-type="char" svg:x="0.062cm" svg:y="0.104cm" svg:width="6.694cm" svg:height="3.413cm" draw:z-index="13"><draw:image xlink:href="Pictures/10000001000000FD00000081E615C73A.png" xlink:type="simple" xlink:show="embed" xlink:actuate="onLoad" draw:mime-type="image/png"/></draw:frame></text:p>
      <text:p text:style-name="P43"><text:tab/></text:p>
      <text:p text:style-name="P43"/>
      <text:p text:style-name="P43"/>
      <text:p text:style-name="P43"/>
      <text:p text:style-name="P43"/>
      <text:p text:style-name="P43">avec l’identifiant qui sera composé de la première lettre du prénom + le nom.</text:p>
      <text:p text:style-name="P43">Et le mot_de_passe qui est haché :</text:p>
      <text:p text:style-name="P43">CREATE TRIGGER cree_utilisateur </text:p>
      <text:p text:style-name="P43">BEFORE INSERT ON utilisateur</text:p>
      <text:p text:style-name="P43">FOR EACH ROW </text:p>
      <text:p text:style-name="P43">BEGIN </text:p>
      <text:p text:style-name="P43"><text:tab/>SET NEW.mot_de_passe=SHA2(NEW.mot_de_passe, 512);</text:p>
      <text:p text:style-name="P43">END //</text:p>
      <text:p text:style-name="P43">t<text:span text:style-name="T30">est :</text:span></text:p>
      <text:p text:style-name="P44">Le mot de passe rentré en clair à bie<text:span text:style-name="T31">n</text:span> été ha<text:span text:style-name="T32">s</text:span>hé.</text:p>
      <text:p text:style-name="P43"><draw:frame draw:style-name="fr3" draw:name="Image18" text:anchor-type="char" svg:width="14.369cm" svg:height="1.508cm" draw:z-index="14"><draw:image xlink:href="Pictures/100000010000021F00000039E7C9DC7C.png" xlink:type="simple" xlink:show="embed" xlink:actuate="onLoad" draw:mime-type="image/png"/></draw:frame><text:tab/></text:p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5">Schéma finale :</text:p>
      <text:p text:style-name="P45"><draw:frame draw:style-name="fr1" draw:name="Image16" text:anchor-type="char" svg:x="0.099cm" svg:y="1.554cm" svg:width="17cm" svg:height="8.897cm" draw:z-index="17"><draw:image xlink:href="Pictures/100000010000066F0000035E7AE36D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Liberation Serif" svg:font-family="'LiLiberation Serif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cdc9" officeooo:paragraph-rsid="0015cdc9"/>
    </style:style>
    <style:style style:name="MP2" style:family="paragraph" style:parent-style-name="Footer">
      <style:paragraph-properties fo:text-align="end" style:justify-single-word="false"/>
      <style:text-properties officeooo:rsid="00467927" officeooo:paragraph-rsid="00467927"/>
    </style:style>
    <style:style style:name="MP3" style:family="paragraph" style:parent-style-name="Footer">
      <style:text-properties officeooo:rsid="0015cdc9" officeooo:paragraph-rsid="0015cdc9"/>
    </style:style>
    <style:style style:name="MP4" style:family="paragraph" style:parent-style-name="Footer">
      <style:paragraph-properties fo:text-align="center" style:justify-single-word="false"/>
      <style:text-properties officeooo:rsid="0015cdc9" officeooo:paragraph-rsid="0015cdc9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text-properties officeooo:rsid="004a4e84" officeooo:paragraph-rsid="004a4e84"/>
    </style:style>
    <style:style style:name="MT1" style:family="text">
      <style:text-properties officeooo:rsid="0048d51c"/>
    </style:style>
    <style:style style:name="MT2" style:family="text">
      <style:text-properties officeooo:rsid="0015cd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29/01/2026</text:p>
      </style:header>
      <style:footer>
        <text:p text:style-name="MP2"><text:bookmark-start text:name="PageNumWizard_FOOTER_Style de page par défaut1"/><text:page-number text:select-page="current">11</text:page-number><text:bookmark-end text:name="PageNumWizard_FOOTER_Style de page par défaut1"/></text:p>
        <text:p text:style-name="MP3"><text:span text:style-name="MT1">BTS SIO-SLAM </text:span>Lycée Paul Louis Courier</text:p>
      </style:footer>
      <style:footer-left>
        <text:p text:style-name="MP4"/>
        <text:p text:style-name="MP5"><text:page-number text:select-page="current">12</text:page-number></text:p>
        <text:p text:style-name="MP6"><text:span text:style-name="MT1">BTS SIO-SLAM </text:span><text:span text:style-name="MT2">Lycée Paul Louis Courier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3:59:45.029280300</meta:creation-date>
    <dc:date>2026-03-19T16:58:26.123269300</dc:date>
    <meta:editing-duration>PT4H27M10S</meta:editing-duration>
    <meta:editing-cycles>68</meta:editing-cycles>
    <meta:generator>LibreOffice/25.8.5.2$Windows_X86_64 LibreOffice_project/9c8b85f387cc00a89945a79c9e6239f32e450ac2</meta:generator>
    <dc:creator>Hugo GANGNEUX</dc:creator>
    <meta:document-statistic meta:table-count="0" meta:image-count="18" meta:object-count="0" meta:page-count="12" meta:paragraph-count="96" meta:word-count="993" meta:character-count="6440" meta:non-whitespace-character-count="5490"/>
  </office:meta>
</office:document-meta>
</file>